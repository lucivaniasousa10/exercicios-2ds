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384296FFE755C7B26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cef68" officeooo:paragraph-rsid="000cef68"/>
    </style:style>
    <style:style style:name="P2" style:family="paragraph" style:parent-style-name="Standard">
      <style:paragraph-properties fo:text-align="center" style:justify-single-word="false"/>
      <style:text-properties officeooo:rsid="000cc716" officeooo:paragraph-rsid="000cc716"/>
    </style:style>
    <style:style style:name="P3" style:family="paragraph" style:parent-style-name="Standard">
      <style:paragraph-properties fo:text-align="center" style:justify-single-word="false"/>
      <style:text-properties officeooo:rsid="000cef68" officeooo:paragraph-rsid="000cef68"/>
    </style:style>
    <style:style style:name="P4" style:family="paragraph" style:parent-style-name="Text_20_body">
      <style:paragraph-properties fo:text-align="center" style:justify-single-word="false"/>
      <style:text-properties officeooo:rsid="000cef68" officeooo:paragraph-rsid="000cef68"/>
    </style:style>
    <style:style style:name="P5" style:family="paragraph" style:parent-style-name="Text_20_body">
      <style:paragraph-properties fo:text-align="start" style:justify-single-word="false"/>
      <style:text-properties officeooo:rsid="000cef68" officeooo:paragraph-rsid="000cef68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cef68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EEP DEPUTADO ROBERTO MESQUITA</text:p>
      <text:p text:style-name="P2"/>
      <text:p text:style-name="P2"><draw:frame draw:style-name="fr1" draw:name="Figura1" text:anchor-type="char" svg:x="5.325cm" svg:y="0.374cm" svg:width="5.99cm" svg:height="4.329cm" draw:z-index="0"><draw:image xlink:href="Pictures/100000000000038400000384296FFE755C7B26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stema de Gestão de Pedidos Online para uma <text:span text:style-name="T1">Lanchonete</text:span></text:p>
      <text:p text:style-name="P2"/>
      <text:p text:style-name="P3">Dupla: Ana Davila,Lucivania Sou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eneral Sampaio-Ce</text:p>
      <text:p text:style-name="P3">2026</text:p>
      <text:h text:style-name="P1" text:outline-level="2"><text:soft-page-break/><text:span text:style-name="Strong_20_Emphasis"><text:span text:style-name="T2">Requisitos Funcionais</text:span></text:span></text:h>
      <text:p text:style-name="Text_20_body">RF01 – O sistema deve permitir que o cliente registre pedidos online, informando os itens desejados.</text:p>
      <text:p text:style-name="Text_20_body">RF02 – O sistema deve permitir que funcionários atualizem o status do pedido (em preparo, pronto, entregue).</text:p>
      <text:p text:style-name="Text_20_body">RF03 – O sistema deve permitir que clientes e funcionários visualizem pedidos em andamento em tempo real.</text:p>
      <text:p text:style-name="Text_20_body">RF04 – O sistema deve permitir o controle de entrega, incluindo identificação do entregador e status da entrega.</text:p>
      <text:p text:style-name="Text_20_body">RF05 – O sistema deve permitir autenticação de usuários, diferenciando clientes e funcionários.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h text:style-name="P1" text:outline-level="2"><text:span text:style-name="Strong_20_Emphasis"><text:span text:style-name="T2">Requisitos Não Funcionais</text:span></text:span></text:h>
      <text:p text:style-name="Text_20_body">RNF01 – O sistema deve apresentar tempo de resposta de até 2 segundos, mesmo com múltiplos usuários simultâneos.</text:p>
      <text:p text:style-name="Text_20_body">RNF02 – O sistema deve ser compatível com dispositivos móveis, funcionando corretamente em celulares e tablets.</text:p>
      <text:p text:style-name="Text_20_body">RNF03 – O sistema deve suportar múltiplos pedidos simultâneos sem perda significativa de desempenho.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oft-page-break/><text:span text:style-name="Strong_20_Emphasis"/></text:p>
      <text:p text:style-name="P5"><text:span text:style-name="Strong_20_Emphasis"><text:span text:style-name="T2">Arquitetura Escolhida: Cliente-Servidor </text:span></text:span></text:p>
      <text:p text:style-name="P4"><text:span text:style-name="Strong_20_Emphasis"/></text:p>
      <text:p text:style-name="P5"><text:span text:style-name="Strong_20_Emphasis"><text:span text:style-name="T2">A arquitetura Cliente-Servidor foi escolhida por ser ideal para sistemas de pequeno e médio porte, como o sistema de gestão de pedidos de uma lanchonete.</text:span></text:span></text:p>
      <text:p text:style-name="Text_20_body">Ela permite que vários usuários (clientes e funcionários) acessem o sistema simultaneamente, enquanto o servidor centraliza o processamento e o armazenamento dos dados.</text:p>
      <text:p text:style-name="Text_20_body">Além disso, essa arquitetura:</text:p>
      <text:list xml:id="list596309789" text:style-name="L2">
        <text:list-item>
          <text:p text:style-name="P7">Facilita o controle e organização dos pedidos </text:p>
        </text:list-item>
        <text:list-item>
          <text:p text:style-name="P7">Permite atualização em tempo real do status </text:p>
        </text:list-item>
        <text:list-item>
          <text:p text:style-name="P7">Centraliza as informações em um único sistema </text:p>
        </text:list-item>
        <text:list-item>
          <text:p text:style-name="P7">Possui menor complexidade comparada a microsserviços </text:p>
        </text:list-item>
        <text:list-item>
          <text:p text:style-name="P6">Atende aos requisitos de desempenho e escalabilidade </text:p>
        </text:list-item>
      </text:list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05T10:28:53.663000000</meta:creation-date>
    <dc:date>2026-05-05T11:16:33.647000000</dc:date>
    <meta:editing-duration>PT4M48S</meta:editing-duration>
    <meta:editing-cycles>1</meta:editing-cycles>
    <meta:document-statistic meta:table-count="0" meta:image-count="1" meta:object-count="0" meta:page-count="3" meta:paragraph-count="24" meta:word-count="240" meta:character-count="1666" meta:non-whitespace-character-count="1441"/>
    <meta:generator>LibreOffice/7.3.3.2$Windows_X86_64 LibreOffice_project/d1d0ea68f081ee2800a922cac8f79445e4603348</meta:generator>
  </office:meta>
</office:document-meta>
</file>